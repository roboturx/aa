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A000001F382B1ADC8991F649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rsid="000f90f0" officeooo:paragraph-rsid="000f90f0"/>
    </style:style>
    <style:style style:name="P2" style:family="paragraph" style:parent-style-name="Standard">
      <style:paragraph-properties fo:text-align="justify" style:justify-single-word="false"/>
      <style:text-properties officeooo:rsid="000f90f0" officeooo:paragraph-rsid="0019fe66"/>
    </style:style>
    <style:style style:name="P3" style:family="paragraph" style:parent-style-name="Standard">
      <style:paragraph-properties fo:text-align="justify" style:justify-single-word="false"/>
      <style:text-properties officeooo:rsid="000f90f0" officeooo:paragraph-rsid="001f958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0f90f0" officeooo:paragraph-rsid="000f90f0"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officeooo:rsid="000f90f0" officeooo:paragraph-rsid="00145b2d"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officeooo:rsid="000f90f0" officeooo:paragraph-rsid="00190f3e" style:font-weight-asian="bold" style:font-weight-complex="bold"/>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officeooo:rsid="000f90f0" officeooo:paragraph-rsid="001ca620" style:font-weight-asian="bold" style:font-weight-complex="bol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officeooo:rsid="000f90f0" officeooo:paragraph-rsid="001d5352" style:font-weight-asian="bold" style:font-weight-complex="bold"/>
    </style:style>
    <style:style style:name="P9" style:family="paragraph" style:parent-style-name="Standard">
      <style:paragraph-properties fo:text-align="justify" style:justify-single-word="false"/>
      <style:text-properties style:text-underline-style="solid" style:text-underline-width="auto" style:text-underline-color="font-color" fo:font-weight="bold" officeooo:rsid="000f90f0" officeooo:paragraph-rsid="00214764" style:font-weight-asian="bold" style:font-weight-complex="bold"/>
    </style:style>
    <style:style style:name="P10" style:family="paragraph" style:parent-style-name="Standard" style:list-style-name="L1">
      <style:paragraph-properties fo:text-align="justify" style:justify-single-word="false"/>
      <style:text-properties fo:font-weight="bold" officeooo:rsid="000f90f0" officeooo:paragraph-rsid="000f90f0" style:font-weight-asian="bold" style:font-weight-complex="bold"/>
    </style:style>
    <style:style style:name="P11" style:family="paragraph" style:parent-style-name="Standard" style:list-style-name="L3">
      <style:paragraph-properties fo:text-align="justify" style:justify-single-word="false"/>
      <style:text-properties fo:font-weight="bold" officeooo:rsid="000f90f0" officeooo:paragraph-rsid="000f90f0" style:font-weight-asian="bold" style:font-weight-complex="bold"/>
    </style:style>
    <style:style style:name="P12" style:family="paragraph" style:parent-style-name="Standard" style:list-style-name="L6">
      <style:paragraph-properties fo:text-align="justify" style:justify-single-word="false"/>
      <style:text-properties fo:font-weight="bold" officeooo:rsid="000f90f0" officeooo:paragraph-rsid="000f90f0" style:font-weight-asian="bold" style:font-weight-complex="bold"/>
    </style:style>
    <style:style style:name="P13" style:family="paragraph" style:parent-style-name="Standard" style:list-style-name="L7">
      <style:paragraph-properties fo:text-align="justify" style:justify-single-word="false"/>
      <style:text-properties fo:font-weight="bold" officeooo:rsid="000f90f0" officeooo:paragraph-rsid="000f90f0" style:font-weight-asian="bold" style:font-weight-complex="bold"/>
    </style:style>
    <style:style style:name="P14" style:family="paragraph" style:parent-style-name="Standard" style:list-style-name="L8">
      <style:paragraph-properties fo:text-align="justify" style:justify-single-word="false"/>
      <style:text-properties fo:font-weight="bold" officeooo:rsid="000f90f0" officeooo:paragraph-rsid="000f90f0" style:font-weight-asian="bold" style:font-weight-complex="bold"/>
    </style:style>
    <style:style style:name="P15" style:family="paragraph" style:parent-style-name="Standard" style:list-style-name="L9">
      <style:paragraph-properties fo:text-align="justify" style:justify-single-word="false"/>
      <style:text-properties fo:font-weight="bold" officeooo:rsid="000f90f0" officeooo:paragraph-rsid="000f90f0" style:font-weight-asian="bold" style:font-weight-complex="bold"/>
    </style:style>
    <style:style style:name="P16" style:family="paragraph" style:parent-style-name="Standard" style:list-style-name="L2">
      <style:paragraph-properties fo:text-align="justify" style:justify-single-word="false"/>
      <style:text-properties officeooo:paragraph-rsid="000f90f0"/>
    </style:style>
    <style:style style:name="P17" style:family="paragraph" style:parent-style-name="Standard" style:list-style-name="L3">
      <style:paragraph-properties fo:text-align="justify" style:justify-single-word="false"/>
      <style:text-properties officeooo:paragraph-rsid="000f90f0"/>
    </style:style>
    <style:style style:name="P18" style:family="paragraph" style:parent-style-name="Standard" style:list-style-name="L1">
      <style:paragraph-properties fo:text-align="justify" style:justify-single-word="false"/>
      <style:text-properties officeooo:rsid="000f90f0" officeooo:paragraph-rsid="00117fb4"/>
    </style:style>
    <style:style style:name="P19" style:family="paragraph" style:parent-style-name="Standard" style:list-style-name="L1">
      <style:paragraph-properties fo:text-align="justify" style:justify-single-word="false"/>
      <style:text-properties officeooo:rsid="000f90f0" officeooo:paragraph-rsid="000f90f0"/>
    </style:style>
    <style:style style:name="P20" style:family="paragraph" style:parent-style-name="Standard" style:list-style-name="L3">
      <style:paragraph-properties fo:text-align="justify" style:justify-single-word="false"/>
      <style:text-properties officeooo:rsid="000f90f0" officeooo:paragraph-rsid="000f90f0"/>
    </style:style>
    <style:style style:name="P21" style:family="paragraph" style:parent-style-name="Standard" style:list-style-name="L3">
      <style:paragraph-properties fo:text-align="justify" style:justify-single-word="false"/>
      <style:text-properties officeooo:rsid="000f90f0" officeooo:paragraph-rsid="0018069f"/>
    </style:style>
    <style:style style:name="P22" style:family="paragraph" style:parent-style-name="Standard" style:list-style-name="L4">
      <style:paragraph-properties fo:text-align="justify" style:justify-single-word="false"/>
      <style:text-properties officeooo:rsid="000f90f0" officeooo:paragraph-rsid="000f90f0"/>
    </style:style>
    <style:style style:name="P23" style:family="paragraph" style:parent-style-name="Standard" style:list-style-name="L5">
      <style:paragraph-properties fo:text-align="justify" style:justify-single-word="false"/>
      <style:text-properties officeooo:rsid="000f90f0" officeooo:paragraph-rsid="0018069f"/>
    </style:style>
    <style:style style:name="P24" style:family="paragraph" style:parent-style-name="Standard" style:list-style-name="L6">
      <style:paragraph-properties fo:text-align="justify" style:justify-single-word="false"/>
      <style:text-properties officeooo:rsid="000f90f0" officeooo:paragraph-rsid="0019fe66"/>
    </style:style>
    <style:style style:name="P25" style:family="paragraph" style:parent-style-name="Standard" style:list-style-name="L6">
      <style:paragraph-properties fo:text-align="justify" style:justify-single-word="false"/>
      <style:text-properties officeooo:rsid="000f90f0" officeooo:paragraph-rsid="000f90f0"/>
    </style:style>
    <style:style style:name="P26" style:family="paragraph" style:parent-style-name="Standard" style:list-style-name="L7">
      <style:paragraph-properties fo:text-align="justify" style:justify-single-word="false"/>
      <style:text-properties officeooo:rsid="000f90f0" officeooo:paragraph-rsid="000f90f0"/>
    </style:style>
    <style:style style:name="P27" style:family="paragraph" style:parent-style-name="Standard" style:list-style-name="L8">
      <style:paragraph-properties fo:text-align="justify" style:justify-single-word="false"/>
      <style:text-properties officeooo:rsid="000f90f0" officeooo:paragraph-rsid="000f90f0"/>
    </style:style>
    <style:style style:name="P28" style:family="paragraph" style:parent-style-name="Standard" style:list-style-name="L8">
      <style:paragraph-properties fo:text-align="justify" style:justify-single-word="false"/>
      <style:text-properties officeooo:rsid="000f90f0" officeooo:paragraph-rsid="001e8f68"/>
    </style:style>
    <style:style style:name="P29" style:family="paragraph" style:parent-style-name="Standard" style:list-style-name="L8">
      <style:paragraph-properties fo:text-align="justify" style:justify-single-word="false"/>
      <style:text-properties officeooo:rsid="000f90f0" officeooo:paragraph-rsid="001f958d"/>
    </style:style>
    <style:style style:name="P30" style:family="paragraph" style:parent-style-name="Standard" style:list-style-name="L9">
      <style:paragraph-properties fo:text-align="justify" style:justify-single-word="false"/>
      <style:text-properties officeooo:rsid="000f90f0" officeooo:paragraph-rsid="000f90f0"/>
    </style:style>
    <style:style style:name="P31" style:family="paragraph" style:parent-style-name="Standard" style:list-style-name="L9">
      <style:paragraph-properties fo:text-align="justify" style:justify-single-word="false"/>
      <style:text-properties officeooo:rsid="000f90f0" officeooo:paragraph-rsid="002ef8eb"/>
    </style:style>
    <style:style style:name="P32" style:family="paragraph" style:parent-style-name="Standard" style:list-style-name="L9">
      <style:paragraph-properties fo:text-align="justify" style:justify-single-word="false"/>
      <style:text-properties officeooo:rsid="000f90f0" officeooo:paragraph-rsid="00306d63"/>
    </style:style>
    <style:style style:name="P33" style:family="paragraph" style:parent-style-name="Standard" style:list-style-name="L9">
      <style:paragraph-properties fo:text-align="justify" style:justify-single-word="false"/>
      <style:text-properties officeooo:rsid="000f90f0" officeooo:paragraph-rsid="0031e8ac"/>
    </style:style>
    <style:style style:name="P34" style:family="paragraph" style:parent-style-name="Standard" style:list-style-name="L9">
      <style:paragraph-properties fo:text-align="justify" style:justify-single-word="false"/>
      <style:text-properties officeooo:rsid="000f90f0" officeooo:paragraph-rsid="0033ac59"/>
    </style:style>
    <style:style style:name="P35" style:family="paragraph" style:parent-style-name="Standard" style:list-style-name="L9">
      <style:paragraph-properties fo:text-align="justify" style:justify-single-word="false"/>
      <style:text-properties officeooo:rsid="000f90f0" officeooo:paragraph-rsid="0035a1b2"/>
    </style:style>
    <style:style style:name="P36" style:family="paragraph" style:parent-style-name="Standard">
      <style:paragraph-properties fo:text-align="justify" style:justify-single-word="false"/>
      <style:text-properties officeooo:rsid="000f90f0" officeooo:paragraph-rsid="000f90f0"/>
    </style:style>
    <style:style style:name="P37" style:family="paragraph" style:parent-style-name="Standard" style:list-style-name="L1">
      <style:paragraph-properties fo:text-align="justify" style:justify-single-word="false"/>
      <style:text-properties fo:font-weight="normal" officeooo:rsid="000f90f0" officeooo:paragraph-rsid="000f90f0" style:font-weight-asian="normal" style:font-weight-complex="normal"/>
    </style:style>
    <style:style style:name="P38" style:family="paragraph" style:parent-style-name="Standard">
      <style:paragraph-properties fo:text-align="justify" style:justify-single-word="false"/>
      <style:text-properties officeooo:rsid="000f90f0" officeooo:paragraph-rsid="00214764" fo:background-color="#ffff00"/>
    </style:style>
    <style:style style:name="P39" style:family="paragraph" style:parent-style-name="Standard" style:list-style-name="L8">
      <style:paragraph-properties fo:text-align="justify" style:justify-single-word="false"/>
      <style:text-properties officeooo:rsid="002a1b2b" officeooo:paragraph-rsid="002a1b2b"/>
    </style:style>
    <style:style style:name="P40" style:family="paragraph" style:parent-style-name="Standard" style:list-style-name="L9">
      <style:paragraph-properties fo:text-align="justify" style:justify-single-word="false"/>
      <style:text-properties officeooo:rsid="000f90f0" officeooo:paragraph-rsid="000f90f0" fo:background-color="transparent"/>
    </style:style>
    <style:style style:name="T1" style:family="text">
      <style:text-properties officeooo:rsid="000f90f0"/>
    </style:style>
    <style:style style:name="T2" style:family="text">
      <style:text-properties fo:font-weight="normal" style:font-weight-asian="normal" style:font-weight-complex="normal"/>
    </style:style>
    <style:style style:name="T3" style:family="text">
      <style:text-properties fo:font-weight="normal" officeooo:rsid="000f90f0" style:font-weight-asian="normal" style:font-weight-complex="normal"/>
    </style:style>
    <style:style style:name="T4" style:family="text">
      <style:text-properties fo:font-weight="normal" officeooo:rsid="00125bcc" style:font-weight-asian="normal" style:font-weight-complex="normal"/>
    </style:style>
    <style:style style:name="T5" style:family="text">
      <style:text-properties officeooo:rsid="00117fb4"/>
    </style:style>
    <style:style style:name="T6" style:family="text">
      <style:text-properties officeooo:rsid="00145b2d"/>
    </style:style>
    <style:style style:name="T7" style:family="text">
      <style:text-properties officeooo:rsid="00154a8a"/>
    </style:style>
    <style:style style:name="T8" style:family="text">
      <style:text-properties officeooo:rsid="00165290"/>
    </style:style>
    <style:style style:name="T9" style:family="text">
      <style:text-properties officeooo:rsid="0018069f"/>
    </style:style>
    <style:style style:name="T10" style:family="text">
      <style:text-properties officeooo:rsid="00190f3e"/>
    </style:style>
    <style:style style:name="T11" style:family="text">
      <style:text-properties officeooo:rsid="0019fe66"/>
    </style:style>
    <style:style style:name="T12" style:family="text">
      <style:text-properties officeooo:rsid="001ca620"/>
    </style:style>
    <style:style style:name="T13" style:family="text">
      <style:text-properties officeooo:rsid="001d5352"/>
    </style:style>
    <style:style style:name="T14" style:family="text">
      <style:text-properties officeooo:rsid="001e8f68"/>
    </style:style>
    <style:style style:name="T15" style:family="text">
      <style:text-properties officeooo:rsid="001f958d"/>
    </style:style>
    <style:style style:name="T16" style:family="text">
      <style:text-properties fo:font-style="italic" style:font-style-asian="italic" style:font-style-complex="italic"/>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background-color="#ffff00" loext:char-shading-value="0"/>
    </style:style>
    <style:style style:name="T19" style:family="text">
      <style:text-properties style:text-underline-style="solid" style:text-underline-width="auto" style:text-underline-color="font-color" officeooo:rsid="001f958d" fo:background-color="#ffff00" loext:char-shading-value="0"/>
    </style:style>
    <style:style style:name="T20" style:family="text">
      <style:text-properties officeooo:rsid="002528c9"/>
    </style:style>
    <style:style style:name="T21" style:family="text">
      <style:text-properties style:font-name="Liberation Serif1" officeooo:rsid="0026b336"/>
    </style:style>
    <style:style style:name="T22" style:family="text">
      <style:text-properties style:font-name="Liberation Serif1" style:text-underline-style="solid" style:text-underline-width="auto" style:text-underline-color="font-color" officeooo:rsid="0026b336" style:font-name-asian="Liberation Serif1" style:font-name-complex="Liberation Serif1"/>
    </style:style>
    <style:style style:name="T23" style:family="text">
      <style:text-properties style:font-name="Liberation Serif" style:text-underline-style="solid" style:text-underline-width="auto" style:text-underline-color="font-color" officeooo:rsid="0026b336" style:font-name-asian="Noto Serif CJK SC" style:font-name-complex="Noto Sans Devanagari"/>
    </style:style>
    <style:style style:name="T24" style:family="text">
      <style:text-properties officeooo:rsid="0026b336"/>
    </style:style>
    <style:style style:name="T25" style:family="text">
      <style:text-properties fo:background-color="#ffff00" loext:char-shading-value="0"/>
    </style:style>
    <style:style style:name="T26" style:family="text">
      <style:text-properties fo:background-color="#ffff00" loext:char-shading-value="0"/>
    </style:style>
    <style:style style:name="T27" style:family="text"/>
    <style:style style:name="T28" style:family="text">
      <style:text-properties officeooo:rsid="002a1b2b"/>
    </style:style>
    <style:style style:name="T29" style:family="text">
      <style:text-properties fo:background-color="#ffd7d7" loext:char-shading-value="0"/>
    </style:style>
    <style:style style:name="T30" style:family="text">
      <style:text-properties officeooo:rsid="002bc05c"/>
    </style:style>
    <style:style style:name="T31" style:family="text">
      <style:text-properties fo:background-color="transparent" loext:char-shading-value="0"/>
    </style:style>
    <style:style style:name="T32" style:family="text">
      <style:text-properties officeooo:rsid="002db6db"/>
    </style:style>
    <style:style style:name="T33" style:family="text">
      <style:text-properties style:text-position="sub 58%" officeooo:rsid="002db6db"/>
    </style:style>
    <style:style style:name="T34" style:family="text">
      <style:text-properties style:text-position="sub 58%" officeooo:rsid="002db6db" fo:background-color="#ffff00" loext:char-shading-value="0"/>
    </style:style>
    <style:style style:name="T35" style:family="text">
      <style:text-properties style:text-position="sub 58%" officeooo:rsid="0033ac59"/>
    </style:style>
    <style:style style:name="T36" style:family="text">
      <style:text-properties style:font-name="Liberation Serif1" fo:font-weight="bold" officeooo:rsid="00306d63" style:font-weight-asian="bold" style:font-weight-complex="bold"/>
    </style:style>
    <style:style style:name="T37" style:family="text">
      <style:text-properties style:font-name="Liberation Serif1" fo:font-weight="bold" officeooo:rsid="0033ac59" style:font-weight-asian="bold" style:font-weight-complex="bold"/>
    </style:style>
    <style:style style:name="T38" style:family="text">
      <style:text-properties style:font-name="Liberation Serif1" officeooo:rsid="0031e8ac"/>
    </style:style>
    <style:style style:name="T39" style:family="text">
      <style:text-properties style:font-name="Liberation Serif1" fo:font-weight="normal" officeooo:rsid="0033ac59" style:font-weight-asian="normal" style:font-weight-complex="normal"/>
    </style:style>
    <style:style style:name="T40" style:family="text">
      <style:text-properties fo:font-weight="bold" style:font-weight-asian="bold" style:font-weight-complex="bold"/>
    </style:style>
    <style:style style:name="T41" style:family="text">
      <style:text-properties style:text-position="super 58%" officeooo:rsid="0031e8ac" fo:background-color="#ffff00" loext:char-shading-value="0"/>
    </style:style>
    <style:style style:name="T42" style:family="text">
      <style:text-properties style:text-position="super 58%" officeooo:rsid="0031e8ac" fo:background-color="transparent" loext:char-shading-value="0"/>
    </style:style>
    <style:style style:name="T43" style:family="text">
      <style:text-properties fo:background-color="#ffffa6" loext:char-shading-value="0"/>
    </style:style>
    <style:style style:name="T44" style:family="text">
      <style:text-properties fo:background-color="#ffffa6" loext:char-shading-value="0"/>
    </style:style>
    <style:style style:name="T45" style:family="text">
      <style:text-properties officeooo:rsid="0035a1b2" fo:background-color="#ffffa6" loext:char-shading-value="0"/>
    </style:style>
    <style:style style:name="T46" style:family="text">
      <style:text-properties officeooo:rsid="0035a1b2" fo:background-color="#ffffa6" loext:char-shading-value="0"/>
    </style:style>
    <style:style style:name="T47" style:family="text">
      <style:text-properties officeooo:rsid="0035a1b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0.203cm" fo:min-width="0.2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STATİSTİK </text:p>
      <text:p text:style-name="P1"/>
      <text:p text:style-name="P4">BÖLÜM 1 – TIPTA ÇALIŞMA DÜZENLERİ</text:p>
      <text:p text:style-name="P1"/>
      <text:p text:style-name="P1">Çalışma düzenleri genel olarak gözlemsel ve deneysel olarak ikiye ayrılabilir. Gözlemsel çalışmalar genellikle hastalıkla ilgili neden, sıklık, risk etkenleri, prognoz gibi nitelikleri belirlemeye yarar. Deneysel (ya da klinik) çalışmalar ise tanı ve tedavi ile ilgili yöntem lerin denendiği çalışmalardır.</text:p>
      <text:p text:style-name="P1"/>
      <text:list xml:id="list3529158618" text:style-name="L1">
        <text:list-item>
          <text:p text:style-name="P10">Gözlemsel çalışmalar</text:p>
        </text:list-item>
      </text:list>
      <text:list xml:id="list2016375106" text:style-name="L2">
        <text:list-item>
          <text:list>
            <text:list-item>
              <text:p text:style-name="P16"><text:span text:style-name="T5">T</text:span><text:span text:style-name="T1">anımlayıcı çalışmada genellikle küçük bir grup denekte göze çarpan, ilginç bulgular rapor edilir. Diğer üç tip gözlemsel çalışma düzenini birbirinden ayıran, çalışmanın süresi ve deneklerde araştırılan konunun çalışmanın başlangıç zamanından </text:span><text:span text:style-name="T3">önce, aynı anda ya da sonra olduğudur. </text:span></text:p>
            </text:list-item>
          </text:list>
        </text:list-item>
      </text:list>
      <text:list xml:id="list53542556942711" text:continue-list="list3529158618" text:style-name="L1">
        <text:list-item>
          <text:list>
            <text:list-item>
              <text:p text:style-name="P10">Tanımlayıcı çalışmalar (vaka raporları)</text:p>
              <text:p text:style-name="P18">En basit çalışma düzeni olan tanımlayıcı çalışmada genellikle küçük bir grup denekte (hasta, fare, akciğer filmi, böbrek biyopsisi, vb.) göze çarpan, ilginç bulgular rapor edilir. </text:p>
            </text:list-item>
            <text:list-item>
              <text:p text:style-name="P10">Retrospektif çalışmalar</text:p>
              <text:p text:style-name="P19">Retrospektif çalışmalarda ise çalışmanın yönü geriye dönüktür; yani bir hastalık durumunda geriye dönerek, hastalığa neden olabilecek risk etkenleri aranır. Retrospektif düzende (case-control study) araştırılan soru "Ne oldu?" sorusudur. </text:p>
            </text:list-item>
            <text:list-item>
              <text:p text:style-name="P10">Kesitsel çalışmalar</text:p>
              <text:p text:style-name="P19">Prevalans çalışmaları adı da verilen kesitsel çalışmalarda deneklerin çalışma arandaki verileri değerlendirilir. Kesitsel çalışma düzeninde (cross-sectional study) araştırılan soru "Ne oluyor?" sorusudur. </text:p>
            </text:list-item>
            <text:list-item>
              <text:p text:style-name="P10">Prospektif çalışmalar</text:p>
              <text:p text:style-name="P19">Prospektif çalışmalarda çalışmanın yönü ileriye dönüktür; örneğin bir risk etkeninin varlığında bir hastalığın ortaya çıkması izlenir. Prospektif çalışma düzeninde (kohort çalışma: cohort study) araştırılan soru "Ne olacak?" sorusudur. </text:p>
            </text:list-item>
          </text:list>
          <text:p text:style-name="P19"/>
        </text:list-item>
        <text:list-item>
          <text:p text:style-name="P10">Deneysel çalışmalar</text:p>
          <text:p text:style-name="P19"><text:span text:style-name="T2">Deneysel çalışmalar genellikle tanı ve tedaviyle ilgili yöntem lerin etkinliklerinin denendiği çalışmalardır. Kontrollü ve kontrolsüz çalışmalar olmak </text:span><text:span text:style-name="T4">ü</text:span><text:span text:style-name="T2">zere ikiye ayrılır. Kontrollü çalışmalarda etkinliği araştırılan yöntem, plasebo ya da başka bir yöntemle karşılaştırılır. Kontrolsüz çalışmalarda ise hastaların hepsine aynı yöntem uygulanır ve sonuçları belirtilir. </text:span></text:p>
          <text:list>
            <text:list-item>
              <text:p text:style-name="P10">Bağımsız eşzamanlı kontrollü çalışmalar</text:p>
              <text:p text:style-name="P37">Bu düzende iki grup denek vardır. Deney grubuna (experimental group) araştırma konusu olan tanı ya da tedavi yöntemi uygulanırken, kontrol grubuna plasebo ya da diğer yöntem uygulanır </text:p>
            </text:list-item>
            <text:list-item>
              <text:p text:style-name="P10">Kendi kendine kontrollü çalışmalar</text:p>
            </text:list-item>
          </text:list>
          <text:p text:style-name="P19">Deney ve kontrol gruplarında farklı hastalar bulunduğu zaman, randomizasyona rağmen, gruplar arasında istenilen benzerlik sağlanamayabilir ya da çalışmanın yapıldığı dönemde henüz bilinmeyen etkenler açısından randomizasyon yapılmadığı için, daha sonraki bulgular nedeniyle randomizasyon yönteminin geçersiz olduğu anlaşılabilir. Bu sorunun uygun bir çözümü aynı hastaların hem deney, hem de kontrol grubunda yer alması ile sağlanabilir. Bu tür çalışmalara kendi kendine kontrollü (self-control) çalışmalar adı verilir.</text:p>
          <text:list text:continue-numbering="true">
            <text:list-item>
              <text:p text:style-name="P10">Çapraz çalışmalar</text:p>
            </text:list-item>
          </text:list>
          <text:p text:style-name="P19">Çapraz (crossover) çalışma düzeninde, hem bağımsız kontrol, hem de kendi kendine kontrol grupları vardır. </text:p>
          <text:list text:continue-numbering="true">
            <text:list-item>
              <text:p text:style-name="P10">Dış kontrollü çalışmalar</text:p>
            </text:list-item>
          </text:list>
          <text:p text:style-name="P19">Eğer kontrol grubu, başka bir araştırma grubuna aitse, ya da araştırıcının daha önce başka bir yöntem uyguladığı bir grupsa (historical controls), bu çalışmalar, dış (external) kontrollü çalışmalar olarak adlandırılır </text:p>
          <text:p text:style-name="P19"><text:soft-page-break/></text:p>
        </text:list-item>
        <text:list-item>
          <text:p text:style-name="P10">Ne zaman hangi çalışma düzeni seçilmeli?</text:p>
          <text:p text:style-name="P19">Her çalışma düzeni her klinik durumda uygulanamaz. Bu nedenle çalışmaya başlamadan önce amaca uygun çalışma düzenlerinden hangisinin seçileceğine doğru karar vermek için her çalışma düzeninin avantaj ve dezavantajlarının iyi bilinmesi gerekir.</text:p>
          <text:p text:style-name="P19">• Yeni tanı ya da tedavi yöntemlerinin etkisinin araştırılması için uygun çalışma düzeni klinik çalışmalardır. </text:p>
          <text:p text:style-name="P19">• Hastalıkların neden, risk etkenleri ve prognozunu belirlemek amacına en uygun çalışmalar prospektif kohort çalışmalardır. </text:p>
          <text:p text:style-name="P19">• Risk etkeni ile hastalığın ortaya çıkması arasında çok uzun süre geçiyorsa ya da nadir bir hastalıktaki risk etkenleri araştırılıyorsa, retrospektif kohort çalışmaları daha yararlıdır. </text:p>
          <text:p text:style-name="P19">• Retrospektif (case-control) çalışmalar da, retrospektif kohort çalışmalar gibi kısa sürede ve düşük maliyetle tamamlanır. </text:p>
        </text:list-item>
      </text:list>
      <text:p text:style-name="P1"/>
      <text:p text:style-name="P5">BÖLÜM <text:span text:style-name="T6">2</text:span> – ÖRNEKLEME <text:span text:style-name="T6">VE </text:span>RANDOMİZASYON</text:p>
      <text:list xml:id="list1727379044" text:style-name="L3">
        <text:list-item>
          <text:p text:style-name="P11">Örnekleme</text:p>
          <text:p text:style-name="P17">Araştırmanın amacı, bir gruptaki gözlemlerden topluma genelleme yapabilmektir. Bir çalışmanın sonuçları, yalnız çalışma örnekleminin temsil ettiği evrene genellenebilir. <text:span text:style-name="T7">Ö</text:span>rneklemin evreni doğru temsil etmesi gerekir. Bu nedenle örneklemdeki deneklerin evrenden rastgele (random) olarak seçilmesi gerekir. Çalışm alar için örneklem oluştururken, bazı random izasyon yöntemlerinin uygulanm ası gerekir. Örneklem seçimi için kullanılan başlıca dört yöntem vardır: </text:p>
          <text:p text:style-name="P17"/>
          <text:list>
            <text:list-item>
              <text:p text:style-name="P11">Basit rastgele örnekleme</text:p>
              <text:p text:style-name="P20">Basit rastgele (random) örneklemede çeşitli istatistik kitaplarındaki rastgele sayılar tablosundan ya da bilgisayarlardaki örnekleme modüllerinden yararlanarak <text:span text:style-name="T7">x</text:span> tane sayı belirlenir ve dosya numarası bu <text:span text:style-name="T7">x</text:span> sayının içinde olan hastalar, örnekleme almır.</text:p>
            </text:list-item>
            <text:list-item>
              <text:p text:style-name="P11">Sistematik örnekleme</text:p>
              <text:p text:style-name="P20">Bu yöntemde evren genişliği (evrendeki denek sayısı), örneklem genişliğine (örneklemdeki denek sayısı) bölünerek elde edilecek rakam kullanılarak, örnekleme alınacak denekler belirlenir. </text:p>
            </text:list-item>
            <text:list-item>
              <text:p text:style-name="P11">Tabakalı örnekleme</text:p>
              <text:p text:style-name="P20">Tamamen rastgele seçim bazen sakıncalı olabilir. Tabakalı örneklemede, örneklem seçimine başlam adan önce, evren, belirlenmiş özellikler açısından tabakalara ayrılır ve her tabakadan rastgele seçim yapılır. </text:p>
            </text:list-item>
            <text:list-item>
              <text:p text:style-name="P11">Küme tipi örnekleme</text:p>
              <text:p text:style-name="P20">Bu örnekleme yönteminde önce evren, küme (cluster) adı verilen altbirimlere bölünür. Daha sonra her kümedeki tüm denekler, ya da diğer randomizasyon yöntemlerinden birine göre seçilen denekler örnekleme alınır. </text:p>
              <text:p text:style-name="P20"/>
            </text:list-item>
          </text:list>
        </text:list-item>
        <text:list-item>
          <text:p text:style-name="P11">Randomizasyon</text:p>
          <text:p text:style-name="P20">Paralel düzende yapılan bir çalışm ada önce hastalar çalışm aya alınma ölçütleri açısından değerlendirilir. Ölçütlere göre uygun olm ayan hastalar çalışma dışı bırakılır. Uygun hastalar ise tedavi gruplarından birine alınır. Hastalara verilecek tedavinin seçilme yöntemi yapılacak çalışmanın sonuçlarının güvenilirliği açısından çok önemlidir. Tedavi seçiminin araştırıcının insiyatifinde olmasının önemli sakıncaları vardır. Bu nedenle hastaların çalışma gruplarına seçiminin rastgele olmasının sağlanm ası gerekir. Bunu sağlayan yöntemlere random izasyon adı verilir. Hasta sayısının az olduğu bir çalışm ada basit random izasyon tek başına</text:p>
          <text:p text:style-name="P20">dengesizliğin azaltılmasında yeterli olmayabilir. Bu durum da randomizasyona şu iki yöntemden biri ya da her ikisi birlikte eklenmelidir:</text:p>
        </text:list-item>
      </text:list>
      <text:list xml:id="list1684429926" text:style-name="L4">
        <text:list-item>
          <text:list>
            <text:list-item>
              <text:p text:style-name="P22">Tabakalandırma</text:p>
            </text:list-item>
            <text:list-item>
              <text:p text:style-name="P22">Bloklama</text:p>
              <text:p text:style-name="P22"><text:soft-page-break/></text:p>
              <text:p text:style-name="P22"/>
              <text:p text:style-name="P22"/>
            </text:list-item>
          </text:list>
          <text:p text:style-name="P22"><text:span text:style-name="T8">A</text:span>raştırmacı önce hastaları bir ya da daha çok prognostik etkene göre sınıflandırır (tabakalandırır), daha sonra her tabakaya baştan belirlenmiş (ve genellikle eşit) sayıda hasta girecek şekilde hastalan seçer (bloklar). Yazı-tura yerine istatistik kaynak kitaplar ya da bilgisayarIardan elde edilebilecek rastgele sayılar tablosundan yararlanarak da randomizasyon yapılabilir. Tabakalandırmaya mutlaka bloklama da eşlik etmelidir. Aksi takdirde basit random izasyon ile bloklama yapılm adan yapılan tabakalandırma arasında, gruplar arası dengenin sağlanm ası açısından fark yoktur. Ama tabakalandırrna olmaksızın bloklama yapılabilir. </text:p>
        </text:list-item>
      </text:list>
      <text:list xml:id="list53541498001772" text:continue-list="list1727379044" text:style-name="L3">
        <text:list-item>
          <text:p text:style-name="P11">Tabakalı analiz</text:p>
          <text:p text:style-name="P21">Birden çok özellik açısından da tabakalandırma yapılabilir. Kaç adet tabakalandırma değişkeni kullanılacağının seçiminde tedaviye yanıtı etkileyen prognostik etkenlerin (ya da kontrol değişkenlerinin) araştırmacı tarafından, henüz araştırm a başlam adan belirlenmesi önemlidir. Prognostik etkenlerin neler olduğu ya literatürdeki bilgilere dayanarak, ya da araştırmacının deneyimlerine dayanarak seçilmelidir. Eğer gereğinden fazla kategori kullanılırsa, araştırmaya alınacak hasta sayısının çok artması ve buna rağmen gruplar arası dengenin tam olarak sağlanamaması gibi sakıncalar ortaya çıkabilir. Öte yandan tabakaların kategorilerinin fazla geniş olması da sakıncalıdır. Hem tabaka sayısı, hem de tabakalardaki kategori sayısı arttıkça araştırmanın yürütülmesi ve grupların dengesinin sağlanması güçleşir. Bu nedenle prognostik etkisi belirgin olmayan değişkenlere göre tabakalandırma yapılmasından kaçınılması uygun olur. Aynı şekilde tabakaların kategorilerinin alt ya da üst sınırlarının belirlenmesinde de prognostik açıdan aralarında fark olduğu varsayılan sınırlar seçilmelidir. Tabakaların kategorilerinin eşit genişliklerde olması gerekmez. </text:p>
          <text:p text:style-name="P21"><text:span text:style-name="T8">Ç</text:span>alışma bittikten sonra altgrupların belirlenmesine "sonradan-tabakalandırma" (post-stratification) adı verilir. Çeşitli etkenlerin prognostik öneminin derecesinin belirlenmesinde sonradan-tabakalandırma yararlıdır, ancak bu yöntemde iki sorun vardır:</text:p>
        </text:list-item>
      </text:list>
      <text:list xml:id="list3291332615" text:style-name="L5">
        <text:list-item>
          <text:list>
            <text:list-item>
              <text:p text:style-name="P23">Çalışmanın gücü azalır ve bazı tabakalarda hasta sayısı çok az olacağı için istatistik analiz sonuçları güvenilir olmayabilir.</text:p>
            </text:list-item>
            <text:list-item>
              <text:p text:style-name="P23">Gruplararası karşılaştırma sayısı artacağı için "istatistiksel önemlilikenflasyonu" riski vardır.</text:p>
            </text:list-item>
          </text:list>
        </text:list-item>
      </text:list>
      <text:list xml:id="list53542317982206" text:continue-list="list53541498001772" text:style-name="L3">
        <text:list-header>
          <text:p text:style-name="P21">Öte yandan gerçekte fark olduğu halde, yapılan araştırmadan elde edilen verilerin analizi ile fark olmadığı gibi bir hata da yapılabilir. Bir çalışmanın gücü, gerçekte fark olduğu zaman bunun istatistik analizle de gösterilebilmesi, yani saptanabilmesi olasılığı olarak tanımlanabilir. </text:p>
          <text:p text:style-name="P21">Tabakalı analizin tek sakıncası çalışmanın gücünün azalması değildir. İstatistikte genel ilke olarak mümkün olan en az sayıda analiz ile inceleme yapılmalıdır. </text:p>
          <text:p text:style-name="P21"/>
          <text:list>
            <text:list-item>
              <text:p text:style-name="P11">Sonuçların prognostik etkene göre standardizasyonu</text:p>
              <text:p text:style-name="P20">Standardizasyon, tabakalardaki sonuçların ağırlıklandırarak kullanılmasıdır. Ağırlıkların seçimi, analizin amacına göre değişir.</text:p>
            </text:list-item>
            <text:list-item>
              <text:p text:style-name="P11">Kontrol değişkenlerinin etkilerinin arıtıldığı istatistik modeller</text:p>
              <text:p text:style-name="P20">Gruplar arasında dengesizlik olduğu zaman kullanılabilecek bir yöntemin tabakalı analiz olduğundan ve bu yöntemin sakıncalarından yukarıda <text:span text:style-name="T9">s</text:span>öz edildi. <text:s/>Tabakalı analizin bu sakıncalarını ortadan kaldıran ve sonuç üzerine prognostik etkenlerin (kontrol değişkenlerinin) etkilerinin arıtıldığı ve tedavinin "saf" etkisinin belirlenebildiği matematik modeller vardır. Bu yöntemlerle sonuç üzerine etkisi olan etkenler (verilen ilaç, cinsiyet, hastalığın şiddeti, yaş vb.) parçalara ayrılarak incelenir. </text:p>
              <text:p text:style-name="P20"><text:soft-page-break/>Sonradan-tabakalandırma ile grup karşılaştırmaları sayısındaki artmaya bağlı "istatistiksel önem lilik enflasyonu", bu istatistik modellerle önlenebilir. Bu yöntemlerle, hem tedavinin et<draw:frame draw:style-name="fr1" draw:name="Image2" text:anchor-type="char" svg:x="3.709cm" svg:y="5.955cm" svg:width="10.215cm" svg:height="17.101cm" draw:z-index="0" draw:transform="translate (-8.8165cm -14.5055cm) rotate (4.71238898038469) translate (8.8165cm 14.5055cm)"><draw:image xlink:href="Pictures/100000000000012A000001F382B1ADC8991F6497.png" xlink:type="simple" xlink:show="embed" xlink:actuate="onLoad" draw:mime-type="image/png"/></draw:frame>kisi prognostik etkenlerden arıtılmış, hem de prognostik etkenlerin önemi test edilmiş olur. Gerek tabakalı analiz, gerekse kontrol değişkenlerinin etkilerinin arıtıldığı modellerin amacı, gruplar arası dengesizliğin neden olduğu taraf tutmayı, ya da yanlılığı ortadan kaldırmaktır. Ancak iki yöntem arasında önemli bir fark vardır. Tabakalı analizde, tabakalardaki hasta sayısı azalacağı için, çalışmanın gücünün azalması pahasına, taraf tutma ortadan kaldırılabilir. Kontrol değişkenlerinin etkilerinin arıtıldığı modeller kullanıldığında ise, (eğer doğru m odel kullanılırsa) hem taraf tutma azalır, hem de sonuçların doğruluk derecesi artar. Böylece istatistiksel önemliliği sınırda olan yargılarırı doğruluğu artabilir, ya da bazen tersine farklı tedavi grupları arasında istatistiksel olarak önemli görünen farklılıkların tedavinin kendisinden değil, gruplar arası prognostik etken dengesizliğinden kaynaklandığı ortaya konabilir. Model kullanılmasının bir diğer yararı ise prognostik etkenlerin önemlilik derecesinin belirlenmesi ve daha sonra yapılacak çalışmaların planlanmasında yararlı olacak veriler elde edilmesidir.</text:p>
              <text:p text:style-name="P20"/>
              <text:p text:style-name="P20">Prognostik etkenlerin etkilerinin arıtılmasında hangi durumlarda hangi istatistik modellerin uygulanabileceği Tablo 12'de özetlenmiştir.</text:p>
            </text:list-item>
          </text:list>
        </text:list-header>
      </text:list>
      <text:p text:style-name="P1"/>
      <text:p text:style-name="P1"/>
      <text:list xml:id="list53540985683495" text:continue-numbering="true" text:style-name="L3">
        <text:list-item>
          <text:list>
            <text:list-item>
              <text:p text:style-name="P11">Prognostik etken denetim yöntemlerinin karşılaştırılması</text:p>
              <text:p text:style-name="P20">Çalışma grubu (örneklem) yeterince büyükse, basit randomizasyon, ölçülen ve ölçülm eyen prognostik etkenler açısından yeterli dengeyi genelliklesağlar. Randomizasyona bir-iki önemli prognostik etkene göre tabakalandırma ve bloklam a eklenirse, gruplar daha da dengeli olur. Herşeye karşın, çalışmaya başlam adan önce denetlenmeyen bazı özellikler açısından gruplarda dengesizlik olabilir. Bu durumda hasta sayısının izin verdiği ölçüde sonradan tabakalandırma yapılarak tabakalar ayrı ayrı analiz edilebilir. Grupların dengesi mükemmel olsa bile, analiz sırasında prognostik etkenlere göre standardizasyon yapılması ile gruplarda tedaviye yanıtın karşılaştırılması daha da saflaştırılmış olur. Sonradan-tabakalandırma ve prognostik etkenlere göre <text:soft-page-break/>standardizasyon birbirini tamamlayan iki yöntemdir. Sonradan-tabakalandırma ile prognostik etkenler açısından farklı olmalarına karşın, grupların karşılaştırılmasının ne kadar geçerli olduğu test edilmiş olur. Standardizasyon ile sonuçların doğruluğu daha da belirginleştirilip, çalışmadan daha fazla bilgi edinilmiş olur. Araştırm anın amacı, çalışmaya alınan hastalardaki sonuçların tüm hastalara genelleştirilebilmesidir. Bu yazıda anlatılan randomizasyon ve prognostik etken denetim çabalarının nedeni budur.</text:p>
            </text:list-item>
          </text:list>
        </text:list-item>
      </text:list>
      <text:p text:style-name="P1"/>
      <text:p text:style-name="P1"/>
      <text:p text:style-name="P6">BÖLÜM <text:span text:style-name="T10">3</text:span> – DEĞİŞKENLER VE ÖZELLİKLERİ</text:p>
      <text:p text:style-name="P2">İstatistikte değişken (variable) terimi, deneklere ait özellikler anlamında kullanılır.</text:p>
      <text:list xml:id="list1775135367" text:style-name="L6">
        <text:list-item>
          <text:p text:style-name="P12">Değişkenlerin ölçümü</text:p>
          <text:p text:style-name="P24"><text:s/>İstatistik analize başlamadan önce ilk yapılacak şey, değişkenlerin nasıl ölçüldüğünün belirlenmesidir. Değişkenlerin alabileceği değerlerin neler olabileceği, neler olamayacağı, yani nasıl ölçüldüğünü belirlemek, yapılacak istatistik analizin seçimi için çok önemlidir. Ölçüm özelliklerine göre değişkenleri başlıca üç gruba ayırabiliriz: nominal, ordinal ve sayısal değişkenler. Nominal ve ordinal ölçümle belirtilen değişkenlere kategorik değişkenler adı da verilmektedir.</text:p>
          <text:list>
            <text:list-item>
              <text:p text:style-name="P12">Nominal ölçüm</text:p>
              <text:p text:style-name="P25">Nominal bir değişkende ölçüm düzeyleri arasında bir sıralama ya da uzaklık-yakmlık gibi belirli bir mesafe yoktur. Ölçüm düzeyleri (levels of measurement), değişkenin alabileceği değerler anlamındadır. <text:s/>Nominal değişken değerleri, rakam olarak değil, ad olarak anlam ifade ederler. <text:s/>Nominal değişkenlerin aldığı değerlerin mutlaka rakam olması gerekmez. İki düzeyli, yani yalnız iki değer alabilen nominal değişkenlere ikili değişkenler (dichotomous variable) adı verilir. </text:p>
            </text:list-item>
            <text:list-item>
              <text:p text:style-name="P12">Ordinal ölçüm</text:p>
              <text:p text:style-name="P25">Ordinal bir değişkende ölçüm düzeyleri arasında bir sıralama vardır, ama düzeyler arasındaki m esafeler belirli değildir. Ordinal değişken değerleri yalnızca "&gt; " ve "&lt; " işlemleri için sayı gibi değerlendirilir; bunlar dışındaki matematik işlemler uygulanamaz. Ordinal değişken değerleri arasında çıkartma işlemi yapılamayacağı için, sıralamayı korumak koşuluyla istenilen rakamlarla kodlanabilir. </text:p>
            </text:list-item>
            <text:list-item>
              <text:p text:style-name="P25">Sayısal ölçüm</text:p>
              <text:p text:style-name="P25">Bir değişkenin aldığı değerler, nominal ya da ordinal değişkenlerde olduğu gibi araştırıcı tarafından belirlenm iş kodlar değil de gerçek rakamlarsa, o değişkenin sayısal ölçüm skalasmda ölçüldüğü söylenebilir. Sayısal ölçümle belirlenen değişkende, değişken düzeyleri arasında hem sıralama, hem de belirli bir mesafe vardır. Sayısal değişken değerlerine ıeel sayılara uygulanan her türlü matematik işlem uygulanabilir. Sayısal değişkenler iki şekilde olabilir: kesikli ya da sayım la belirtilen sayısal değişken (irıterval variable) ve sürekli ya da ölçüm le belirtilen sayısal değişken (continuous variable). Eğer bir sayısal değişken her değeri alamıyor, ancak belirli değerleri alabiliyorsa, o değişkene kesikli değişken adı verilir. Sayım la belirtilen değerleri alabilen değişkenler kesiklidir. H er türlü değeri alabilen değişkenler ise, sürekli ya da ölçüm le belirtilen değişkenlerdir. </text:p>
              <text:p text:style-name="P25">Sayısal değişkenler, sınıflandırılarak ordinal değişkenlere dönüştürebilir. Çok gerekmedikçe, sayısal değişkenleri ordinal değişkenlere dönüştürmek uygun değildir. İstatistik analiz sırasında hataya yol açmaz, ama daha az bilgi veren yöntem ler kullanılmasını gerekli kılabilir. Bu nedenle çalışmalar sırasında verileri toplarken, deneklere ait sayısal değişkenler sınıflandırılmadan, gerçek değerleri ile kaydedilmelidir.</text:p>
            </text:list-item>
            <text:list-item>
              <text:p text:style-name="P12">"Önemli rakam " sayısı</text:p>
              <text:p text:style-name="P25"><text:span text:style-name="T11">B</text:span>ir sayıdaki önemli rakam sayısı o sayının ne kadar duyarlı bir şekilde ölçüldüğü ile ilgili olarak belirlenir. Bir rakam, ondalık ayırıcı noktanın sağında ya da solunda da olsa, Hb örneğinde olduğu gibi önemli rakam olabilir. <text:span text:style-name="T11">N</text:span>oktanın solunda bulunan tüm <text:soft-page-break/>rakamların önemli rakam olması gerekmez. Sayılarla m atem atik işlem yaparken, önemli rakam sayılarına dikkat etmek gerekir. </text:p>
              <text:p text:style-name="P25">Kural olarak toplama, çarpma, karekök alma vb. matematik işlemlerin sonucundaki "önemli rakam " sayısı, işlem yapılan sayılardaki en düşük "önem li rakam " sayısından fazla olamaz.</text:p>
              <text:p text:style-name="P25"/>
            </text:list-item>
          </text:list>
        </text:list-item>
        <text:list-item>
          <text:p text:style-name="P12">Değişkenlerin dağılım özelliği</text:p>
          <text:p text:style-name="P25"><text:s/>Normal dağılım <text:s/>şekli simetriktir. Normal dağılım eğrisi, çan şeklinde olduğu için çan eğrisi olarak da adlandırılmıştır. Normal dağılım simetrik olduğu için normal dağılım gösteren değişkenlerin ortalama, ortanca ve modları eşittir. İstatistikte dağılımın normal olup olmadığının belirlenm esi çok önem lidir. Çünkü farklı dağılım gösteren verilere uygulanacak tanımlayıcı ve analitik istatistik yöntem leri de farklıdır.</text:p>
          <text:list>
            <text:list-item>
              <text:p text:style-name="P12">Dağılım şekli ölçütleri</text:p>
              <text:p text:style-name="P25">Eğer bir dağılım simetrik değilse, dağılım eğrisinde çan eğrisinin tepe noktası ortada değil, sağa ve sola kaym ış olacaktır. Denekler ortalamadan daha büyük değerlerde toplanıyorlarsa, negatif çarpık ya da sola çarpık (negatively skewed, skewed to the left), küçük değerlerde toplanıyorlarsa, pozitif çarpık ya da sağa çarpık (positively skewed, skewed to the right) dağılımdan sözedilir Eğrinin tepesinin sivriliğinin şekli de basıklık (kurtosis) ile belirtilir. Tepesi sivriyse, leptokurtik, tepesi basıksa, platikurtik dağılımdan söz edilir (Şekil 3). Çarpıklık ve basıklık dereceleri de histogramlardan anlaşılabilir, ama bu özellikleri temsil eden indekslere de bakmak yararlı olabilir. Normal dağılım için çarpıklık ve basıklık indeksleri O'dır. Pozitif değerler, çarpıklık için pozitif çarpıklığı, basıklık için leptokurtik olduğunu gösterir.</text:p>
            </text:list-item>
            <text:list-item>
              <text:p text:style-name="P12">Verilerin dağılım özelliği niçin önemlidir?</text:p>
              <text:p text:style-name="P25">İstatistikteki en önemli konulardan biri dağılım özelliğidir. Parametrils testlerin tümünün uygulanabilmesi için gereken varsayımların başında verilerin dağılımının normal olması gelir. Dağılımın normal olup olmadığı grafik ve istatistik analiz yöntemleri ile araştırılır.Değerlerin histogramını çizerek dağılımın normalden sapıp sapmadığını kabaca anlamanın olası olduğunu görmüştük. Bir diğer grafik yöntem de normal olasılık grafiği (normal probability plot) adı verilen grafiğin çizilmesidir. Bu grafikte bir eksen gözlenen değerler, diğer eksen ise normal dağılım olduğu varsayımına göre beklenen değerler eksenidir. Veriler normal dağılım gösteriyorsa, noktaların bir doğru üzerinde yer alması ya da etrafında belirli bir pattern göstermeden dağılması gerekir. Grafik yöntemlerden dağılımın normal olup olmadığı hakkında fikir edinilebilir. Ama bu izlenimin istatistik yöntemlerle de test edilmesi gerekir. Shapiro-Wilks' ve Lilliefors testleri bu amaç için sıklıkla kullanılan testlerdir. </text:p>
              <text:p text:style-name="P25"/>
            </text:list-item>
          </text:list>
        </text:list-item>
        <text:list-item>
          <text:p text:style-name="P12">SPSS'te normal dağılım testleri nasıl yapılır?</text:p>
          <text:p text:style-name="P25"/>
        </text:list-item>
      </text:list>
      <text:p text:style-name="P7">BÖLÜM <text:span text:style-name="T12">4</text:span> – VERİTABANININ HAZIRLANMASI</text:p>
      <text:p text:style-name="P1"/>
      <text:p text:style-name="P1"/>
      <text:list xml:id="list614792104" text:style-name="L7">
        <text:list-item>
          <text:p text:style-name="P13">Nominal ve ordinal verilerin kodlanması</text:p>
          <text:p text:style-name="P26">Nominal değişkenleri kodlarken, kontrol ya da plasebo grubunun en küçük ya da en büyük rakamla kodlanm ası yararlıdır. <text:s/>İkili nom inal değişkenlerde eğer değişken düzeyleri "var, yok" ya dıı"evet, hayır" gibi ise, "var" ya da "evet"leri, yani olumlu yanıtları 1 ile, "y ok" ya da "hayır"ları, yani olumsuz yanıtları 0 ile kodlamak uygundur. Bazı istatistik analiz tekniklerinin bilgisayarda yapılabilm esi için değişkenlerin bu şekilde kodlanmış olması gerekir.</text:p>
          <text:p text:style-name="P26">Ordinal değişkenlerin düzeyleri arasında bir sıralama söz konusu olduğu için, bu tip değişkenleri kodlarken, değişkenlerin düzeylerine göre sıralama yapılmalıdır. </text:p>
          <text:p text:style-name="P26"/>
        </text:list-item>
        <text:list-item>
          <text:p text:style-name="P13"><text:soft-page-break/>Değişkenleri adlandırırken dikkat edilecek noktalar</text:p>
          <text:p text:style-name="P26">t lenellikle, çalışma sırasında her deneğe ait veriler ayrı bir veri giriş formuna yazılarak toplanır ve çalışma bitiminde topluca veritabanma girilir. Veı ll.ıbanım hazırlarken, önce her değişkene bir ad vermek gerekir. Değişken <text:span text:style-name="T12">adl</text:span>arının, değişken verilerinin neler olduğunu hatırlatıcı olması önemlidir. <text:span text:style-name="T12">Öz</text:span>ellikle çok sayıda değişken varsa, bu konu çok daha önemlidir. liilgisayar ortamındaki veritabanma girilecek değişkenlerin adlarını belirli'iken bazı kısıtlayıcı kurallar vardır. Her yazılımdaki kısıtlamalar kendine <text:span text:style-name="T12">öz</text:span>giidür. Bu nedenle kullanacağınız veritabanı yazılımının el kitaplarına <text:span text:style-name="T12">baş</text:span>vurmanız gereklidir.</text:p>
          <text:p text:style-name="P26"/>
        </text:list-item>
        <text:list-item>
          <text:p text:style-name="P13">Veri girişinde hata kontrolü</text:p>
          <text:p text:style-name="P26">liir çalışmada verilerin elde edilmesinden bilgisayara girilip, istatistik <text:span text:style-name="T12">ana</text:span>lizinin yapılacağı ana kadar çeşitli aşamalarda hatalar olabilir. İstatistik analize başlamadan önce olası hataların farkedilmesi için sıklık <text:span text:style-name="T12">tabl</text:span>oları ve histogramlarm gözden geçirilmesi yararlı olur I İn.; bir yöntem, hatalı veri girişinin denetiminde ideal değildir. Eğer veri <text:span text:style-name="T12">dağılı</text:span>mı çok geniş değilse, aynı verileri iki kişinin farklı veritabanlarma girip, »mırıl İni iki veritabamnm kullanılan yazılıma özgü yöntemlerle karşılaştırılması en ideal hata denetimi yöntemi olabilir. Veri girişi hata denetimi kesinlikle aceleye getirilmemelidir. Aksi takdirde, istatistik analiz bittikten sonra farkedilecek bir hatalı veri girişi, tüm çabaların boşa gitmesine neden olur.</text:p>
          <text:p text:style-name="P26"/>
        </text:list-item>
      </text:list>
      <text:p text:style-name="P8">BÖLÜM <text:span text:style-name="T13">5</text:span> – <text:s/>TANIMLAYICI İSTATİSTİK</text:p>
      <text:p text:style-name="P1"/>
      <text:p text:style-name="P1">Bir çalışmanın raporunu yazarken, yalnızca istatistik analiz sonuçlarını vermek yeterli olmaz. <text:span text:style-name="T13">Ç</text:span>alışma grubunun çeşitli özelliklerinin özetlendiği ortalama, oran, standart sapma vb. rakamlar topluluğuna tanımlayıcı istatistik adı verilir.</text:p>
      <text:p text:style-name="P1"><draw:custom-shape text:anchor-type="paragraph" draw:z-index="1" draw:name="Shape 1" draw:style-name="gr1" svg:width="1.532cm" svg:height="1.153cm" svg:x="5.743cm" svg:y="0.21cm"><text:p/><draw:enhanced-geometry svg:viewBox="0 0 21600 21600" draw:mirror-horizontal="false" draw:mirror-vertical="false"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text:p>
      <text:list xml:id="list3860053507" text:style-name="L8">
        <text:list-item>
          <text:p text:style-name="P14">Merkezi eğilim ölçütleri</text:p>
          <text:p text:style-name="P27">Değişken değerleri hakkında bilgi veren en önemli ölçütlerin başında merkezi eğilim ölçütleri (measures o f central tendency) gelir. Tıpta kullanılan üç merkezi eğilim ölçütü ortalama (mean), ortanca (median) ve mod'dur. Ortalama ve ortanca en sık kullanılan merkezi eğilim ölçütleridir.</text:p>
          <text:list>
            <text:list-item>
              <text:p text:style-name="P14">Ortalama - <text:s text:c="3"/><text:span text:style-name="T20"><text:s/></text:span><text:span text:style-name="T21">x̄ X̄ (x0304 Alt+x)</text:span></text:p>
              <text:p text:style-name="P27">Değerlerin toplamının denek sayısına bölünmesiyle elde edilen aritmetik ortalama en sık kullanılan merkezi eğilim ölçütüdür. X üzerinde çizgiyle (X) gösterilir. Sayısal değişkenler için merkezi eğilim ölçütü olarak ortalama kullanılır. Ordinal değişkenler için ortalam a kullanılamaz. Ortalamadaki önemli rakam sayısı, değişkenlerdeki önemli rakam sayısından fazla olmamalıdır. Ortalama, aşırı değerlerden etkilenir. </text:p>
            </text:list-item>
            <text:list-item>
              <text:p text:style-name="P14">Ortanca</text:p>
              <text:p text:style-name="P27">Ortanca, küçükten büyüğe (ya da büyükten küçüğe) doğru sıralandığınd ı lam ortadaki deneğin değeridir. Denek sayısı çiftse, ortanca, ortada yeralan iki deneğin değerlerinin ortalaması olarak hesaplanır. Ortanca, ordinal veriler için en iyi merkezi dağılım ölçütüdür. Çünkü değerlerin sıralaması dikkate alınarak elde edilir. Sayısal veriler için tercih edilen merkezi eğilim ölçütü ise ortalamadır. Simetrik dağılımlar için ortalama ve ortanca birbirine yakındır. Ortanca aşırı değerlerden etkilenmez. Bu nedenle aşırı uç değerler varsa, sayısal veriler için de ortanca tercih edilmelidir.</text:p>
            </text:list-item>
            <text:list-item>
              <text:p text:style-name="P14">Mod</text:p>
              <text:p text:style-name="P27">Mod, değişken değerleri içinde en fazla görülen değerdir. Mod, tıpta nadiren kullanılan bir merkezi eğilim ölçütüdür.</text:p>
            </text:list-item>
            <text:list-item>
              <text:p text:style-name="P14">Geometrik ortalam</text:p>
              <text:p text:style-name="P27">Denek sayısı = n olduğunda, geometrik ortalama (geometric mearı: GM), denek değerlerinin çarpımının n'inci kökü olarak hesaplanır. Geometrik ortalama, asıl olarak <text:soft-page-break/>logaritm ik dağılım gösteren veriler için kullanılır. Aşırı değerlerin olduğu sayısal verilerin merkezi eğilim ölçütü olarak da kullanılabilir.</text:p>
            </text:list-item>
            <text:list-item>
              <text:p text:style-name="P14">Ne zaman hangi merkezi eğilim ölçütünü kullanalım?</text:p>
              <text:p text:style-name="P27">Bir değişkenin merkezi eğilimini en iyi temsil eden ölçütü seçerken, göz önüne alınması gereken iki önemli etken vardır. Bunlar değişkenin ölçüm skalası (yani değişkenin ordinal mi, sayısal mı olduğu) ve değişken değerlerinin dağılımıdır. Değişken değerlerinin dağılımı simetrik ya da çarpık (skewed) olabilir. Eğer aşırı düşük ya da yüksek değerler varsa, dağılım simetrik değildir. Uygun merkezi eğilim ölçütlerinin seçimi şu şekilde yapılabilir:</text:p>
              <text:p text:style-name="P27">• Simetrik dağılan sayısal veriler için ortalama,</text:p>
              <text:p text:style-name="P27">• Ordinal veriler ya da simetrik olmayan sayısal veriler için ortanca,</text:p>
              <text:p text:style-name="P27">• Logaritmik skalada ölçülen veriler için geometrik ortalama seçilmelidir.</text:p>
            </text:list-item>
          </text:list>
          <text:p text:style-name="P27"><draw:custom-shape text:anchor-type="paragraph" draw:z-index="2" draw:name="Shape 2" draw:style-name="gr1" svg:width="1.532cm" svg:height="1.153cm" svg:x="5.122cm" svg:y="0.101cm"><text:p/><draw:enhanced-geometry svg:viewBox="0 0 21600 21600" draw:mirror-horizontal="false" draw:mirror-vertical="false"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text:p>
        </text:list-item>
        <text:list-item>
          <text:p text:style-name="P14">Yayılma ölçütleri</text:p>
          <text:p text:style-name="P27">Farklı grupların ortalama ve ortanca gibi merkezi dağılım ölçütleri aynı olduğu halde, gruplar birbirlerinden çok farklı olabilirler. Bu nedenle merkezi eğilim ölçütleri yanında, yayılma ölçütleri (measures of dispersion) de çok önemlidir. Çeşitli yayılma ölçütleri vardır.</text:p>
          <text:list>
            <text:list-item>
              <text:p text:style-name="P14">Değer aralığı</text:p>
              <text:p text:style-name="P27">Değişken değerlerinin dağılımım belirten yararlı bir ölçüt, en büyük ve en küçük değer arasındaki fark olan değer aralığıdır (range). </text:p>
            </text:list-item>
            <text:list-item>
              <text:p text:style-name="P14">Standart sapma ve varyans</text:p>
              <text:p text:style-name="P28">Tüm değerlerin dağılımı ile ilgili bilgi veren, sık kullanılan yayılma ölçütleri standart sapma (standard deviation) ve varyanstır (variance). <text:span text:style-name="T16">Tüm değerler eşitse, her ikisi de sıfıra eşittir.</text:span> Değerler arasında farklar arttıkça standart sapın<text:span text:style-name="T14">a ve</text:span> varyans büyür. <text:span text:style-name="T17">SD, sd ya da s</text:span> ile gösterilen standart sapma, değişken değerlerinin ortalamanın etrafındaki yayılmasını temsil eden bir yayılma ölçütüdür. Formülü şöyledir:</text:p>
            </text:list-item>
          </text:list>
          <text:p text:style-name="P28"/>
          <text:list>
            <text:list-item>
              <text:list>
                <text:list-item>
                  <text:list>
                    <text:list-header>
                      <text:p text:style-name="P28"><text:span text:style-name="T24">SD = </text:span><text:span text:style-name="T22">∑</text:span><text:span text:style-name="T23"> (X-X̄)</text:span><text:span text:style-name="T24"> <text:s text:c="6"/><text:tab/></text:span>X<text:span text:style-name="T24">̄</text:span> = Ortalama</text:p>
                      <text:list>
                        <text:list-item>
                          <text:list>
                            <text:list-header>
                              <text:p text:style-name="P28"><text:span text:style-name="T24">n-1<text:tab/><text:tab/></text:span>n = Denek sayısı</text:p>
                            </text:list-header>
                          </text:list>
                        </text:list-item>
                      </text:list>
                    </text:list-header>
                  </text:list>
                </text:list-item>
              </text:list>
            </text:list-item>
          </text:list>
          <text:p text:style-name="P28"/>
          <text:p text:style-name="P28">Standart sapmanın karesine varyans adı verilir. Standart sapma ve varyans, birçok istatistik analiz yönteminin temelini oluşturur. Dağılım özelliği ne olursa olsun, değerlerin en az %75'i ortalama ± 2 SD içinde yer alır. </text:p>
          <text:p text:style-name="P28">Normal dağılım gösteren değişken değerleri için aşağıdaki kurallar geçerlidir: </text:p>
          <text:p text:style-name="P28">• Değerlerin %67'si ortalama ±1 SD içindedir.</text:p>
          <text:p text:style-name="P28">• Değerlerin % 95'i ortalama ±2 SD içindedir.</text:p>
          <text:p text:style-name="P28">• Değerlerin %99.7'si ortalama ±3 SD içindedir.</text:p>
          <text:list text:continue-numbering="true">
            <text:list-item>
              <text:p text:style-name="P14">Değişim (varyasyon) katsayısı</text:p>
              <text:p text:style-name="P27">Birimleri farklı olan değişkenlerin yayılmalarını karşılaştırmak için değişim katsayıları kullanabilir. Değişim katsayısı (coefficient o f variation), standart sapmanın ortalam aya oranının yüzde olarak ifadesidir. Kısaca cv ile gösterilir. <text:s/>Değişim katsayısı, biyolojik bilimlerde, genellikle bir laboratuvar işleminin ölçüm doğruluğunu test etmek için kullanılır.</text:p>
            </text:list-item>
            <text:list-item>
              <text:p text:style-name="P14">PersentiI</text:p>
              <text:p text:style-name="P27">Persentil genellikle, boy, ağırlık vb. standart normların dağılımları için kullanılır. Bir diğer kullanıldığı yer ise, laboratuvar değerlerinin alt ve üst normal sınırlarının belirlenmesidir. Genellikle kabul edilen alt normal sınır 2.5 persentil ve üst normal sınır 97.5 persentildir. Değerlerin dağılımı normalse, ortalama -2SD ve ortalama +2SD, sırasıyla 2.5 ve 97.5 persentil değerlerine karşılık gelir.</text:p>
            </text:list-item>
            <text:list-item>
              <text:p text:style-name="P14">Çeyreklerarası aralık</text:p>
              <text:p text:style-name="P27">25. ve 75. persentil değerleri arasındaki farka çeyreklerarası aralık (interquartile range) adı verilir. Yani değerlerin ortada yer alan %50'si, çeyrekler arası aralıktır.</text:p>
            </text:list-item>
            <text:list-item>
              <text:p text:style-name="P14"><text:soft-page-break/>Ne zaman hangi yayılma ölçütünü kullanalım ?</text:p>
              <text:p text:style-name="P27">Merkezi dağılım ölçütlerinin seçiminde olduğu gibi yayılma ölçütlerinin seçiminde de göz önüne alınması gereken bazı noktalar vardır. Aşağıdaki kurallar genellikle geçerlidir.</text:p>
              <text:p text:style-name="P27">• Merkezi eğilim ölçütü olarak ortalama kullanıldığı zaman, yayılma ölütü olarak da standart sapma kullanılır.</text:p>
              <text:p text:style-name="P27">• Persentil ve çeyrekler arası aralık iki durumda kullanılır: (a) Merkezieğilim ölçütü olarak ortanca kullanılmışsa; (b) Merkezi eğilim ölçütü olarak ortalama kullanılmış, ama gözlemlerin standart normlara uygunluğu karşılaştırılmak isteniyorsa.</text:p>
              <text:p text:style-name="P27">• Dağılımın şekli ne olursa olsun değerlerin ortada kalan %50'si tanımlanmak isteniyorsa çeyrekler arası aralık kullanılır.</text:p>
              <text:p text:style-name="P27">• Sayısal verilerde aşın uç değerler belirtilmek isteniyorsa değer aralığı kullanılır.</text:p>
              <text:p text:style-name="P27">• Sayısal verilerde farklı birimlerle ölçülen değerlerin dağılımları karşılaştırılmak isteniyorsa, değişim katsayısı kullanılır.</text:p>
            </text:list-item>
          </text:list>
          <text:p text:style-name="P27"/>
        </text:list-item>
        <text:list-item>
          <text:p text:style-name="P14">Standart hata</text:p>
          <text:p text:style-name="P29"><text:s/>Bir örneklemdeki denek değerlerinin örneklem ortalamasından aşağı ya da yukarı olmak üzere ne kadar uzaklaştığının, yani denek değerlerinin yayılm asının ölçütünün standart sapma olduğunu biliyorsunuz. Ortalamanın örneklem dağılımının ölçütü ortalamanın standart hatasıdır (<text:span text:style-name="T26">Standard error ofmean</text:span>). Kısaca <text:span text:style-name="T26">SEM</text:span> ile gösterilen standart hata, standart sapmanın denek sayısının karekökiine bölümüne eşittir.</text:p>
          <text:p text:style-name="P39"/>
          <text:p text:style-name="P29">SEM = SD / <text:s/><text:span text:style-name="T28">√</text:span>n</text:p>
          <text:p text:style-name="P27">SD = Standart sapma</text:p>
          <text:p text:style-name="P27">n = Denek sayısı</text:p>
          <text:p text:style-name="P27"/>
          <text:list>
            <text:list-item>
              <text:p text:style-name="P14">Standart sapma ile standart hata arasındaki ilişki</text:p>
            </text:list-item>
          </text:list>
          <text:p text:style-name="P29">Standart sapmanın örneklem değerlerinin ortalamadan sağa ve sola (yada aşağı ve yukarı) ne kadar dağıldığını gösteren bir ölçüt olduğunu biliyorsunuz. Dağılım eğrisi ne kadar basıksa (yani platikurtikse), standart sapma o kadar fazla, dağılım eğrisi ne kadar sivriyse (yani leptokurtikse) standart sapma o kadar azdır. <text:span text:style-name="T26">Normal dağılımda tüm değerlerin yaklaşık % 68'i</text:span> maksimum bir standart sapma, <text:span text:style-name="T26">%95'i </text:span>ise iki standart sapma kadar ortalamadan u<text:span text:style-name="T15">z</text:span>aktır. </text:p>
          <text:p text:style-name="P29">Standart hata (standart sapmanın denek sayısının karekökiine bölümüne eşit olması nedeniyle), standart sapma arttıkça artar, denek sayısı arttıkça azalır. <text:span text:style-name="T17">Standart hata, örneklem ortalamasının, aynı evrenden alınması mümkün olan eşit büyüklükteki örneklemlerin ortalamalarının değişkenliği hakkında fikir verir. </text:span></text:p>
          <text:p text:style-name="P29">Makalelerde ortalama ile birlikte bazen standart sapma, bazen de standart hatanın verildiği görülmektedir. <text:span text:style-name="T18">Çalışmaya alman örneklemin yayılma özellikleri verilmek isteniyorsa, doğru olanı standart sapmanın verilmesidir. </text:span>Çünkü standart hata, örneklemdeki deneklerin yayılımı ile ilgili olmadığı için, makaledeki çalışma grubunun <text:span text:style-name="T17">değişkenliğini göstermez.</text:span></text:p>
          <text:p text:style-name="P29"><text:span text:style-name="T26">Ç</text:span><text:span text:style-name="T18">alışma gruplarındaki ortalamaların karşılaştırıldığı grafiklerde ise sta</text:span><text:span text:style-name="T19">n</text:span><text:span text:style-name="T18">dart hatanın kullanılması daha doğrudur.</text:span> <text:span text:style-name="T29">Çünkü ortalamaların karşılaştırılması sırasında farklı grupların (ya da örneklemlerin) aynı evrenden seçilip seçilmediği test edilir. Bir grubun seçildiği evrenin ortalaması ile diğer grubun seçildiği evrenin ortalaması farklı ise grup ortalamalarının da farklı olduğu sonucuna varılır. </text:span></text:p>
        </text:list-item>
      </text:list>
      <text:p text:style-name="P3"/>
      <text:p text:style-name="P1"/>
      <text:p text:style-name="P1"/>
      <text:p text:style-name="P1"/>
      <text:p text:style-name="P1"/>
      <text:p text:style-name="P1"/>
      <text:p text:style-name="P1"/>
      <text:p text:style-name="P1"/>
      <text:p text:style-name="P1"><text:soft-page-break/></text:p>
      <text:p text:style-name="P9">BÖLÜM <text:span text:style-name="T13">5</text:span> – ANALİTİK İSTATİSTİK</text:p>
      <text:p text:style-name="P1"/>
      <text:p text:style-name="P38">Bilimsel çalışmaların amacı, örneklem değerlerinden evren değerlerinin kestirilmesidir. Evren parametrelerinin kestirilmesi için ya güven aralığı ve sınırları ya da hipotez testleri kullanılır. </text:p>
      <text:p text:style-name="P1"><draw:custom-shape text:anchor-type="paragraph" draw:z-index="3" draw:name="Shape 3" draw:style-name="gr1" svg:width="1.532cm" svg:height="1.153cm" svg:x="7.158cm" svg:y="0.074cm"><text:p/><draw:enhanced-geometry svg:viewBox="0 0 21600 21600" draw:mirror-horizontal="false" draw:mirror-vertical="false"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text:p>
      <text:list xml:id="list2744453952" text:style-name="L9">
        <text:list-item>
          <text:p text:style-name="P15">Güven aralığı ve güven sınırları</text:p>
          <text:p text:style-name="P30"><text:span text:style-name="T30">E</text:span>vreninden seçilecek <text:span text:style-name="T30">x</text:span> hasta içeren örneklemlerin %95'inde ortalama değer, bu grubun ortalama değeri ± 2SEM arasında yer alacaktır. <text:s/>Yalnız ortalama değil, oran, relatif risk, "odds" oranı, bağıntı, iki ortalama arasındaki fark, iki oran arasındaki fark vb. bir çok istatistik için de güven sınırları belirlenebilir.</text:p>
          <text:p text:style-name="P30"><draw:custom-shape text:anchor-type="paragraph" draw:z-index="4" draw:name="Shape 4" draw:style-name="gr1" svg:width="1.532cm" svg:height="1.153cm" svg:x="5.75cm" svg:y="0.157cm"><text:p/><draw:enhanced-geometry svg:viewBox="0 0 21600 21600" draw:mirror-horizontal="false" draw:mirror-vertical="false" draw:text-areas="?f4 ?f4 ?f3 ?f3" draw:type="star4" draw:modifiers="9321.0586881473"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text:p>
        </text:list-item>
        <text:list-item>
          <text:p text:style-name="P15">Hipotez testleri</text:p>
          <text:p text:style-name="P30"><text:span text:style-name="T30">H</text:span>ipotez testleri de aynı amaca yönelik ve elde edilen sonuç açısından güven sınırlarıyla eşdeğer yöntemlerdir.</text:p>
          <text:p text:style-name="P30">İstatistik hipotez testinin sorusu "İki grup, ortalama <text:span text:style-name="T32">a</text:span>çısından aynı evrenden mi seçilmiştir?" dir <text:span text:style-name="T32">ise,</text:span> bu sorunun yanıtının "evet" olduğu varsayılır. Hesaplamalar sonucunda bu soruya "evet" yanıtı verme olasılığı test edilir ve hesaplanan olasılık yeterince küçükse, hipotez kabul edilem ez ve iki grubun aynı evrenden seçilmediği, ortalamalarınm farklı olduğu kabul edilir.</text:p>
          <text:list>
            <text:list-item>
              <text:p text:style-name="P15">H0 ve H, hipotezleri</text:p>
              <text:p text:style-name="P31">Farklılık olmadığının varsayıldığı hipoteze, yokluk hipotezi ya da farksızlık hipotezi (nııll hypothesis) adı verilir ve H<text:span text:style-name="T33">0</text:span> ile gösterilir. Yani <text:span text:style-name="T26">H</text:span><text:span text:style-name="T34">0</text:span><text:span text:style-name="T26"> hipotezi "... ile ... arasında fark yoktur</text:span>" şeklindedir. H<text:span text:style-name="T33">1</text:span> ile gösterilen ve alternatif hipotez adı verilen hipotez ise, H<text:span text:style-name="T33">0</text:span> <text:s/>hipotezinin tersidir. Yani <text:span text:style-name="T26">H</text:span><text:span text:style-name="T34">1</text:span><text:span text:style-name="T26"> hipotezi "... ile ... arasmda fark vardır</text:span>" şeklindedir. İstatistik analiz sonucunda H<text:span text:style-name="T33">0</text:span> hipotezi, yani fark olmadığı reddedilince ne kadar yanıldığımız hesaplanır. Örneğin hesaplanan olasılık %12 ise, H<text:span text:style-name="T33">0</text:span> hipotezinin reddedilmesi ile %12 olasılıkla yanılacağımız anlaşılır. H<text:span text:style-name="T33">0</text:span> hipotezi reddedilince H<text:span text:style-name="T33">1</text:span> hipotezinin doğru olduğu kabul edilmelidir. Eğer H<text:span text:style-name="T33">0</text:span> hipotezinin reddedilmesi ile yanılma olasılığı %12 ise, H<text:span text:style-name="T33">1</text:span> hipotezinin kabul edilmesi ile yanılma olasılığının da %12 olması gerekir.</text:p>
            </text:list-item>
            <text:list-item>
              <text:p text:style-name="P15">P değeri ve yanılma düzeyi</text:p>
              <text:p text:style-name="P32">H<text:span text:style-name="T33">0 </text:span>hipotezinin reddedilmesi için hesaplanan olasılığın %5 ya da daha az olması genellikle kabul edilen sınırdır; yani H<text:span text:style-name="T33">0</text:span> hipotezinin doğruluğu için hesaplanan olasılık %5 ya da daha küçükse, bu hipotezin kabul edilemeyeceği yargısına varılır. Bu değere yanılma düzeyi adı verilir ve <text:span text:style-name="T36">α</text:span> ile gösterilir. Hesaplanan olasılık ise, olasılık (probability) sözcüğünün ilk harfi olan p ile gösterilir. P değeri 0.05 olduğunda, H<text:span text:style-name="T33">1</text:span> hipotezinin tesadüfen doğru olma şansı %5'tir. </text:p>
            </text:list-item>
            <text:list-item>
              <text:p text:style-name="P15">Test istatistiği</text:p>
              <text:p text:style-name="P33">Hipotez testlerinin hemen hemen hepsinde önce, <text:span text:style-name="T26">p değerinin hesaplanmasında kullanılacak bir rakam</text:span> bulunur; daha sonra bu rakamın büyüklüğüne dayanılarak p değeri hesaplanır. Test istatistiği (test statistics) adı verilen ve<text:span text:style-name="T26"> t, Z, x</text:span><text:span text:style-name="T41">2</text:span><text:span text:style-name="T26"> , vb.</text:span> adlarla anılan ve her durumda başka birinin kullanılmasının doğru olduğu rakamlardır. Neden kimi durumlarda t, kimi durumlarda<text:span text:style-name="T31"> x</text:span><text:span text:style-name="T42">2 </text:span>'nin kullanıldığı test edilen <text:span text:style-name="T44">değişkenin dağılım özellikleri ile ilişkilidir.</text:span> Hesaplanan test istatistiği, uygun tablolardaki değerlerle karşılaştırılır. Bu tablolarda sütunları yanılma düzeyi (<text:span text:style-name="T38">α</text:span>) ve satırları serbestlik derecesi (degrees ofjreedom) olarak gösteren rakamlar vardır. Genellikle her biri yanılma düzeyinin 0.50,0.10, 0.05,0.01, 0.001,... gibi değerlerine karşılık gelen 5-6 sütun bulunur. <text:span text:style-name="T44">Serbestlik derecesi tanımı, her hipotez testi için farklıdır. </text:span>Kimi testlerde denek sayıları, kimi testlerde grup sayıları, kimi testlerde de her ikisi birden serbestlik derecesinin hesaplanmasında kullanılır. Hesaplanan test istatistiği, istenilen yanılma düzeyi ve o hipotez testinde belirtilmiş şekilde hesaplanan serbestlik derecesine karşılık <text:soft-page-break/>gelen tablo değeri ile karşılaştırılır. Eğer hesaplanan test istatistiğinin mutlak değeri, tabloda ki değerden büyükse, a yanılma payı ile H„ hipotezi reddedilir. </text:p>
            </text:list-item>
            <text:list-item>
              <text:p text:style-name="P15">Hipotezin yönü</text:p>
              <text:p text:style-name="P34">H<text:span text:style-name="T33">1</text:span> <text:s/>hipotezi, yani alternatif hipotez, H<text:span text:style-name="T35">0</text:span> hipotezinin tersidir. H<text:span text:style-name="T35">0</text:span> hipotezi "iki ortalama arasında fark yoktur" ise, H<text:span text:style-name="T33">1</text:span> hipotezi genellikle "iki ortalama arasında fark vardır" şeklinde belirtilir. Bu cümlede iki ortalamadan hangisinin diğerinden büyük olduğu belirtilmemiştir. Böyle yön belirtilmemiş bir alternatif hipoteze iki-yönlü (two-tailed) hipotez adı verilir. Pratikte genellikle iki-yönlü hipotezler kurulur. Nadiren tek-yönlii hipotezler kullanılır.</text:p>
            </text:list-item>
            <text:list-item>
              <text:p text:style-name="P15">Hipotez testinin hataları ve güç</text:p>
              <text:p text:style-name="P30">Teorik olarak hiç bir olayın gerçekleşme olasılığı %100'e, gerçekleşmeme <text:s/>olasılığı ise %0'a ulaşamaz. Aynı şekilde istatistikte de hiç bir zaman %0 ve %100 olasılığa ulaşılamaz. Bir anlamda istatistik bilimi, bu gerçekten doğmuştur. Hipotez testleri ile ulaşılan sonuçlarda da %100 doğruluktan söz edilemez.</text:p>
              <text:p text:style-name="P34">Hipotez testleri sırasında iki tür hata yapılabilir. Bu hatalardan biri yokluk hipotezinin doğru olduğu halde reddedilmesidir. <text:span text:style-name="T36">α</text:span> <text:span text:style-name="T40">hatası</text:span> ya da tip I hata olarak adlandırılan bu hata payı, genellikle 0.05 yani %5 olarak alınır. Bu durumda gerçekte fark olmadığı halde, %5 olasılıkla fark olduğu sonucuna varılması kabul edilir.</text:p>
              <text:p text:style-name="P35">Tip I hatanın tersine gerçekte fark olduğu halde test sonucunda fark olmadığı sonucuna da varılabilir. Bu hataya da <text:span text:style-name="T37">β</text:span><text:span text:style-name="T40"> hatası</text:span> ya da tip II hata adı verilir. Tip I hata yalancı pozitiflik, tip II hata ise yalancı negatifliğe eşdeğer olarak düşünülebilir. Gerçekte fark olduğu zaman test sonucunda da fark olduğu sonucuna varılması olasılığına ise testin gücü (power) adı verilir. Güç, I - <text:span text:style-name="T39">β</text:span><text:span text:style-name="T37"> </text:span>'ya eşittir. </text:p>
              <text:p text:style-name="P35">Bir testte tip I hata ne kadar küçük tutulursa, tip II hata o kadar artar. </text:p>
              <text:p text:style-name="P35">Tip II hata olasılığı artınca, testin gücü azalacaktır. Testin gücünü azaltmadan her iki tip hatayı da azaltmak, ya da bir tip hatayı azaltırken, diğer tip hatanın artmamasını sağlamak için denek sayısı arttırılmalıdır.</text:p>
            </text:list-item>
            <text:list-item>
              <text:p text:style-name="P15">Hipotez testi koşullan (ya da varsayımları)</text:p>
              <text:p text:style-name="P30">İstatistik analizi (1) uygun yöntemin seçilmesi, (2) yönteme özgü hesaplamaların yapılması ve (3) sonuçların yorumlanması olarak üç aşamada ele alırsak, en kolay aşama hesaplamalardır; çünkü artık güçlü ve hızlı bilgisayarlar ve kolay kullanımlı istatistik yazılımlar sayesinde en karmaşık hesaplamalar bile saniyeler içerisinde yapılabilmektedir. Her türlü veriye, tüm hipotez testlerindeki ya da güven sınırlarının hesaplanmasında kullanılan formüller uygulanarak, matematik işlemler yapıldığında bir test istatistiği ve buna karşılık gelen bir p değeri ya da güven sınırlan bulunabilir. Ama istatistik analizde başta gelen sorun, örneklemden elde edilen sonuçların evrene ekstrapole edilebilirliğini sağlamaktır. Bu nedenle istatistik analizde asıl sorun doğru yöntemin seçilmesi ile ilgilidir. Uygun olmayan yöntemlerle yapılan analiz sonuçlarının evreni temsil ettiğini öne sürmek, bilimsel olarak hatalı olmasının yanında, insan yaşamı ile ilgili taşıdığı sorumluluk nedeniyle tıp alanında daha da önemlidir. <text:s/><text:span text:style-name="T46">S</text:span><text:span text:style-name="T44">ağlık alanında çalışanların hem araştırma yaparken, hem de makale okurken, istatistik analizle ilgili yöntemlere özel önem vermesi kaçınılmazdır.</text:span></text:p>
              <text:p text:style-name="P40">Her hipotez testi, her türlü veriye uygulanamaz. Hipotez testlerinin uygulanabilmesi için verilerin dağılım ve yayılma özellikleri, denek sayısı, çaIışmadaki grup sayısı, değişkenlerin ve grupların bağımlı ya da bağım sız olması gibi bazı koşulların sağlanması, diğer bir tanımla hipotez testinin uygulanabilmesi için gerekli varsayımların yerine getirilmesi gerekir. <text:s/>Hangi hipotez testi için ne gibi koşulların arandığı ilgili bölümlerde anlatılmıştır. </text:p>
              <text:p text:style-name="P40">Öte yandan hipotez testinin uygulanabilmesi için gereken bazı koşulların sağlanıp sağlanmadığını anlamak her zaman bu kadar kolay olmayabilir. Ö rneğin bir çok hipotez testinin koşullarının başında gelen verilerin normal dağılıma uyup uymadığını ancak uygun grafik ya da analiz yöntemleri ile saptayabiliriz. İstatistik analize başlamadan <text:soft-page-break/>önce çalışma düzenine ve verilere uygun hipotez testlerinden hangisi ya da hangilerinin uygulanabileceğine karar vermek için mutlaka ilgili testlerin koşullarının sağlanıp sağlanmadığı araştırılmalıdır. Buna dikkat edilmezse ne olur? Birincisi, yokluk hipotezi yanlış olmadığı halde reddedilebilir. Eğer uygun koşullar sağlanmadığı halde hipotez testi uygulanırsa, eldeki veriler, iki grup ortalaması arasında fark olmadığını gösterse bile fark varmış gibi sonuç elde edilebilir. Bazen de tersine, gerçekte fark olduğu halde, uygun koşullar sağlanmazsa, fark olmadığı sonucuna varılabilir.</text:p>
            </text:list-item>
            <text:list-item>
              <text:p text:style-name="P15">Parametrik ve nonparametrik testler</text:p>
              <text:p text:style-name="P30">Nonparametrik testler, daha az koşulun varlığında uygulanabilen testlerdir. Parametrik testlerin hem en hemen hepsinin uygulanabilmesi için ise, en azından verilerin normal dağılıma uyması ve her testte farklı olm ak üzere başka koşulların da sağlanması gerekir. Parametrik ya da nonparametrik testlerin genel bir tanımı yoktur. Genel olarak nonparametrik testlerle nominal, ordinal ya da normal dışı dağılım gösteren sayısal veriler analiz edilebilirken, parametrik testlerle normal dağılım gösteren sayısal verilerin analizi yapılabilir. Öte yandan normal dağılıma uygun verilere nonparametrik test uygulanması pek hatalı sayılmazken, ordinal ya da normal dışı dağılım gösteren verilere parametrik test uygulanması daha sakıncalıdır. </text:p>
              <text:p text:style-name="P30">Her testin uygulanabilmesi için gerekli koşulların neler olduğu ve verilerin bu koşullara uygunluğunun nasıl saptanacağının mutlaka iyi bilinmesi gerekir. Eğer koşulların sağlanıp sağlanmadığını <text:span text:style-name="T26">bilmiyorsanız</text:span>, verilerin analizinde <text:span text:style-name="T26">nonparametrik test</text:span> kullanılması daha güvenli olur. Ancak parametrik test için gerekli koşulların sağlanmasına karşın nonparametrik test uygulanması halinde, parametrik testlerin kendine özgü avantajlarından yararlanmamış olursunuz.</text:p>
            </text:list-item>
          </text:list>
          <text:p text:style-name="P30"/>
        </text:list-item>
        <text:list-item>
          <text:p text:style-name="P15">Güç analizi ve örneklem büyüklüğünün saptanması</text:p>
          <text:p text:style-name="P30"/>
          <text:list>
            <text:list-item>
              <text:p text:style-name="P15">Tek grup ortalaması için örneklem büyüklüğü</text:p>
            </text:list-item>
          </text:list>
          <text:p text:style-name="P30"/>
          <text:p text:style-name="P30"/>
        </text:list-item>
      </text:list>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8T04:28:13.388620319</meta:creation-date>
    <dc:date>2022-07-21T05:35:40.624696478</dc:date>
    <meta:editing-duration>PT45M12S</meta:editing-duration>
    <meta:editing-cycles>9</meta:editing-cycles>
    <meta:generator>LibreOffice/7.2.5.2$Linux_X86_64 LibreOffice_project/20$Build-2</meta:generator>
    <meta:document-statistic meta:table-count="0" meta:image-count="1" meta:object-count="0" meta:page-count="12" meta:paragraph-count="176" meta:word-count="4839" meta:character-count="38224" meta:non-whitespace-character-count="33430"/>
  </office:meta>
</office:document-meta>
</file>